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_5f_de_5f_documento" style:display-name="Version_de_documento" style:family="table">
      <style:table-properties style:width="17.59cm" table:align="margins"/>
    </style:style>
    <style:style style:name="Version_5f_de_5f_documento.A" style:display-name="Version_de_documento.A" style:family="table-column">
      <style:table-column-properties style:column-width="4.397cm" style:rel-column-width="16383*"/>
    </style:style>
    <style:style style:name="Version_5f_de_5f_documento.A1" style:display-name="Version_de_docu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Version_5f_de_5f_documento.B1" style:display-name="Version_de_documento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Version_5f_de_5f_documento.A2" style:display-name="Version_de_docu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Version_5f_de_5f_documento.B2" style:display-name="Version_de_documento.B2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Version_5f_de_5f_documento.C2" style:display-name="Version_de_documento.C2" style:family="table-cell">
      <style:table-cell-properties style:vertical-align="middle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Version_5f_de_5f_documento.D2" style:display-name="Version_de_documento.D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  <style:text-properties fo:font-size="10pt" fo:font-style="italic" officeooo:rsid="00065142" officeooo:paragraph-rsid="00065142" style:font-size-asian="10pt" style:font-style-asian="italic" style:font-size-complex="10pt" style:font-style-complex="italic"/>
    </style:style>
    <style:style style:name="P5" style:family="paragraph" style:parent-style-name="Header">
      <style:paragraph-properties fo:text-align="center" style:justify-single-word="false"/>
      <style:text-properties fo:font-size="20pt" fo:language="es" fo:country="ES" fo:font-weight="bold" officeooo:rsid="00029eee" officeooo:paragraph-rsid="00029eee" style:font-size-asian="17.5pt" style:font-weight-asian="bold" style:font-size-complex="20pt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 style:list-style-name="L1">
      <style:text-properties fo:font-size="16pt" fo:language="es" fo:country="ES" fo:font-weight="bold" officeooo:rsid="00048e33" officeooo:paragraph-rsid="00048e33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language="es" fo:country="ES" fo:font-weight="bold" officeooo:rsid="00048e33" officeooo:paragraph-rsid="00048e33" style:font-size-asian="14pt" style:font-weight-asian="bold" style:font-size-complex="16pt" style:font-weight-complex="bold"/>
    </style:style>
    <style:style style:name="P9" style:family="paragraph" style:parent-style-name="Standard" style:list-style-name="L1">
      <style:text-properties fo:font-size="16pt" fo:language="es" fo:country="ES" fo:font-weight="bold" officeooo:rsid="00081a54" officeooo:paragraph-rsid="00048e33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2pt" fo:language="es" fo:country="ES" fo:font-weight="normal" officeooo:rsid="00062620" officeooo:paragraph-rsid="00062620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language="es" fo:country="ES" fo:font-weight="normal" officeooo:rsid="00062620" officeooo:paragraph-rsid="0006262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s" fo:country="ES" fo:font-weight="normal" officeooo:rsid="000636c8" officeooo:paragraph-rsid="000636c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s" fo:country="ES" fo:font-weight="normal" officeooo:rsid="00065142" officeooo:paragraph-rsid="00065142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language="es" fo:country="ES" fo:font-weight="bold" officeooo:rsid="000636c8" officeooo:paragraph-rsid="000636c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language="es" fo:country="ES" fo:font-weight="bold" officeooo:rsid="000636c8" officeooo:paragraph-rsid="000636c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6pt" fo:language="es" fo:country="ES" fo:font-weight="bold" officeooo:rsid="00048e33" officeooo:paragraph-rsid="00048e33" style:font-size-asian="14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48e33" officeooo:paragraph-rsid="00048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48e33" officeooo:paragraph-rsid="00048e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36c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5142"/>
    </style:style>
    <style:style style:name="T4" style:family="text">
      <style:text-properties officeooo:rsid="00081a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ex</text:p>
          </text:index-title>
          <text:p text:style-name="P1">Información del Proyecto<text:tab/>3</text:p>
          <text:p text:style-name="P2">Descripción<text:tab/>3</text:p>
          <text:p text:style-name="P2">Plataforma de destino<text:tab/>3</text:p>
          <text:p text:style-name="P2">Herramientas a utilizar<text:tab/>3</text:p>
          <text:p text:style-name="P1">Nomenclatura de los objetos<text:tab/>3</text:p>
          <text:p text:style-name="P1">Control de versiones<text:tab/>4</text:p>
        </text:index-body>
      </text:table-of-content>
      <text:p text:style-name="P6"/>
      <text:p text:style-name="P16"/>
      <table:table table:name="Version_de_documento" table:style-name="Version_5f_de_5f_documento" table:template-name="Simple Grid Columns">
        <table:table-column table:style-name="Version_5f_de_5f_documento.A" table:number-columns-repeated="4"/>
        <table:table-row>
          <table:table-cell table:style-name="Version_5f_de_5f_documento.A1" office:value-type="string">
            <text:p text:style-name="P18">Version</text:p>
          </table:table-cell>
          <table:table-cell table:style-name="Version_5f_de_5f_documento.B1" office:value-type="string">
            <text:p text:style-name="P18">Autor</text:p>
          </table:table-cell>
          <table:table-cell table:style-name="Version_5f_de_5f_documento.B1" office:value-type="string">
            <text:p text:style-name="P18">Numero de paginas</text:p>
          </table:table-cell>
          <table:table-cell table:style-name="Version_5f_de_5f_documento.A1" office:value-type="string">
            <text:p text:style-name="P18">Contenido</text:p>
          </table:table-cell>
        </table:table-row>
        <table:table-row>
          <table:table-cell table:style-name="Version_5f_de_5f_documento.A2" office:value-type="string">
            <text:p text:style-name="P17">1</text:p>
          </table:table-cell>
          <table:table-cell table:style-name="Version_5f_de_5f_documento.B2" office:value-type="string">
            <text:p text:style-name="P17">ProK</text:p>
          </table:table-cell>
          <table:table-cell table:style-name="Version_5f_de_5f_documento.C2" office:value-type="string">
            <text:p text:style-name="P17">X</text:p>
          </table:table-cell>
          <table:table-cell table:style-name="Version_5f_de_5f_documento.D2" office:value-type="string">
            <text:p text:style-name="P17">Creacion del documento</text:p>
          </table:table-cell>
        </table:table-row>
      </table:table>
      <text:p text:style-name="P8"/>
      <text:p text:style-name="P8"/>
      <text:list xml:id="list4218998540" text:style-name="L1">
        <text:list-item>
          <text:p text:style-name="P7"><text:toc-mark-start text:id="IMark2318879900792" text:outline-level="1"/><text:span text:style-name="T4">Información</text:span> del Proyecto<text:toc-mark-end text:id="IMark2318879900792"/></text:p>
        </text:list-item>
      </text:list>
      <text:p text:style-name="P8"/>
      <text:list xml:id="list122250326966565" text:continue-numbering="true" text:style-name="L1">
        <text:list-item>
          <text:list>
            <text:list-item>
              <text:p text:style-name="P9"><text:toc-mark text:string-value="Descripción" text:outline-level="2"/>Descripción</text:p>
            </text:list-item>
          </text:list>
        </text:list-item>
      </text:list>
      <text:p text:style-name="P8"/>
      <text:p text:style-name="P10">El proyecto consiste en una aplicación que permita el inicio de sesion y el registro de usuarios a la plataforma, una vez dentro, el usuario tendra acceso a customizar su perfil, a subir o eliminar fotos y finalmente, a agregar a otros usuarios como amigo. <text:span text:style-name="T1">El idioma de dicha app sera, por defecto, espanol y como lenguaje secundario, Ingles.</text:span></text:p>
      <text:p text:style-name="P10"/>
      <text:list xml:id="list122250804107610" text:continue-numbering="true" text:style-name="L1">
        <text:list-item>
          <text:list>
            <text:list-item>
              <text:p text:style-name="P7"><text:toc-mark text:string-value="Plataforma de destino" text:outline-level="2"/>Plataforma de destino</text:p>
            </text:list-item>
          </text:list>
        </text:list-item>
      </text:list>
      <text:p text:style-name="P8"/>
      <text:p text:style-name="P10">Esta aplicación estara disponible para Android exclusivamente, no se descarta en un futuro portarlo a un entorno Web o incluso a IOS.</text:p>
      <text:p text:style-name="P10"/>
      <text:list xml:id="list122249928651445" text:continue-numbering="true" text:style-name="L1">
        <text:list-item>
          <text:list>
            <text:list-item>
              <text:p text:style-name="P7"><text:toc-mark text:string-value="Herramientas a utilizar" text:outline-level="2"/>Herramientas a utilizar</text:p>
            </text:list-item>
          </text:list>
        </text:list-item>
      </text:list>
      <text:p text:style-name="P8"/>
      <text:p text:style-name="P10">Dada la plataforma del proyecto, se utilizaran las siguientes herramientas:</text:p>
      <text:p text:style-name="P10"/>
      <text:list xml:id="list1435665661" text:style-name="L2">
        <text:list-item>
          <text:list>
            <text:list-item>
              <text:p text:style-name="P11">Github</text:p>
            </text:list-item>
            <text:list-item>
              <text:p text:style-name="P11">Kotlin / Java</text:p>
            </text:list-item>
            <text:list-item>
              <text:p text:style-name="P11">Android studio</text:p>
            </text:list-item>
            <text:list-item>
              <text:p text:style-name="P11">Firebase</text:p>
            </text:list-item>
            <text:list-item>
              <text:p text:style-name="P11">Material design</text:p>
            </text:list-item>
          </text:list>
        </text:list-item>
      </text:list>
      <text:p text:style-name="P10"/>
      <text:list xml:id="list122251080654265" text:continue-list="list122249928651445" text:style-name="L1">
        <text:list-item>
          <text:p text:style-name="P7"><text:toc-mark text:string-value="Nomenclatura de los objetos" text:outline-level="1"/>Nomenclatura de los objetos</text:p>
        </text:list-item>
      </text:list>
      <text:p text:style-name="P8"/>
      <text:p text:style-name="P12">Para el correcto mantenimiento de los objetos de este proyecto, se utilizaran las siguientes reglas de nomencla<text:span text:style-name="T3">t</text:span>u<text:span text:style-name="T3">r</text:span>a:</text:p>
      <text:p text:style-name="P12"/>
      <text:list xml:id="list3505045118" text:style-name="L3">
        <text:list-item>
          <text:p text:style-name="P14">Documentos: <text:span text:style-name="T2">Iniciales del documento + aplicación + versiones</text:span></text:p>
        </text:list-item>
        <text:list-item>
          <text:p text:style-name="P14">Codigo: <text:span text:style-name="T2">Se utilizaran las reglas de Kotlin</text:span></text:p>
        </text:list-item>
      </text:list>
      <text:p text:style-name="P15"><text:span text:style-name="T2"/></text:p>
      <text:p text:style-name="P15"><text:span text:style-name="T2"/></text:p>
      <text:list xml:id="list122249438414975" text:continue-list="list122251080654265" text:style-name="L1">
        <text:list-item>
          <text:p text:style-name="P7"><text:soft-page-break/><text:toc-mark text:string-value="Control de versiones" text:outline-level="1"/>Control de versiones</text:p>
        </text:list-item>
      </text:list>
      <text:p text:style-name="P13">Para el control de versiones de los objetos, se utilizara github, se puede encontrar el repositorio del proyecto <text:a xlink:type="simple" xlink:href="https://github.com/Little-Karins-Projects/MiniGram" text:style-name="Internet_20_link" text:visited-style-name="Visited_20_Internet_20_Link">aqui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language="es" fo:country="ES" fo:font-weight="bold" officeooo:rsid="00029eee" officeooo:paragraph-rsid="00029eee" style:font-size-asian="17.5pt" style:font-weight-asian="bold" style:font-size-complex="2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officeooo:rsid="00065142" officeooo:paragraph-rsid="00065142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o de Concepcion – Minigram</text:p>
      </style:header>
      <style:footer>
        <text:p text:style-name="MP2">Little Loot &amp; The Karins Project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9T12:22:43.112000000</dc:date>
    <meta:editing-duration>PT21M58S</meta:editing-duration>
    <meta:editing-cycles>7</meta:editing-cycles>
    <meta:document-statistic meta:table-count="1" meta:image-count="0" meta:object-count="0" meta:page-count="4" meta:paragraph-count="35" meta:word-count="227" meta:character-count="1367" meta:non-whitespace-character-count="1187"/>
  </office:meta>
</office:document-meta>
</file>